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1" svg:font-family="Calibri" style:font-family-generic="roman"/>
    <style:font-face style:name="Liberation Sans" svg:font-family="'Liberation Sans'" style:font-family-generic="swiss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2.6862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0.7626in"/>
    </style:style>
    <style:style style:name="co9" style:family="table-column">
      <style:table-column-properties fo:break-before="auto" style:column-width="1.7083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0327in"/>
    </style:style>
    <style:style style:name="co12" style:family="table-column">
      <style:table-column-properties fo:break-before="auto" style:column-width="1.012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1.1146in" fo:break-before="auto" style:use-optimal-row-height="fals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6354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edc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dedce6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dedce6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fo:background-color="#dedc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</style:style>
    <style:style style:name="ce18" style:family="table-cell" style:parent-style-name="Default" style:data-style-name="N0">
      <style:table-cell-properties fo:background-color="#dedc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52">
      <style:table-cell-properties fo:background-color="#dedc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15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Noto Sans" fo:font-size="6.40000009536743pt" fo:font-style="normal" fo:text-shadow="none" style:text-underline-style="none" fo:font-weight="normal" style:font-size-asian="6.40000009536743pt" style:font-style-asian="normal" style:font-weight-asian="normal" style:font-size-complex="6.40000009536743pt" style:font-style-complex="normal" style:font-weight-complex="normal"/>
    </style:style>
    <style:style style:name="ce26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manutenção preventiva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7"/>
        <table:table-column table:style-name="co4" table:default-cell-style-name="ce19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Default"/>
        <table:table-column table:style-name="co9" table:default-cell-style-name="ce7"/>
        <table:table-column table:style-name="co10" table:default-cell-style-name="ce7"/>
        <table:table-column table:style-name="co8" table:number-columns-repeated="2" table:default-cell-style-name="Default"/>
        <table:table-column table:style-name="co11" table:default-cell-style-name="ce7"/>
        <table:table-column table:style-name="co8" table:number-columns-repeated="989" table:default-cell-style-name="Default"/>
        <table:table-column table:style-name="co12" table:number-columns-repeated="6" table:default-cell-style-name="ce7"/>
        <table:table-column table:style-name="co8" table:number-columns-repeated="1536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Descrição</text:p>
          </table:table-cell>
          <table:table-cell table:style-name="ce1" office:value-type="string" calcext:value-type="string">
            <text:p>Unid. Medida</text:p>
          </table:table-cell>
          <table:table-cell table:style-name="ce1" office:value-type="string" calcext:value-type="string">
            <text:p>Qtd.</text:p>
          </table:table-cell>
          <table:table-cell table:style-name="ce8" office:value-type="string" calcext:value-type="string">
            <text:p>Valor Máximo Unitário Mensal (R$)</text:p>
          </table:table-cell>
          <table:table-cell table:style-name="ce8" office:value-type="string" calcext:value-type="string">
            <text:p>Valor Total Estimado Anual</text:p>
          </table:table-cell>
          <table:table-cell table:number-columns-repeated="3"/>
          <table:table-cell table:style-name="ce8" office:value-type="string" calcext:value-type="string">
            <text:p>Valor estimado</text:p>
          </table:table-cell>
          <table:table-cell table:style-name="ce8" office:value-type="string" calcext:value-type="string">
            <text:p>Valor vencedor</text:p>
          </table:table-cell>
          <table:table-cell table:style-name="ce8" office:value-type="string" calcext:value-type="string">
            <text:p>desconto</text:p>
          </table:table-cell>
          <table:table-cell table:number-columns-repeated="1635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ELEVADOR OTIS TIPO PANORÂMICO SEM CASA DE MÁQUINAS - 3 PARADAS - DISTÂNCIA DE 3,40M ENTRE ELAS - CAPAC. 8 PASSAGEIROS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823.54" calcext:value-type="float">
            <text:p><text:s/>R$ 823.54 </text:p>
          </table:table-cell>
          <table:table-cell table:style-name="ce20" table:formula="of:=[.D2]*[.E2]" office:value-type="float" office:value="2470.62" calcext:value-type="float">
            <text:p><text:s/>R$ 2,470.62 </text:p>
          </table:table-cell>
          <table:table-cell table:style-name="ce24"/>
          <table:table-cell table:number-columns-repeated="2"/>
          <table:table-cell table:style-name="ce20" office:value-type="float" office:value="1275432.48" calcext:value-type="float">
            <text:p><text:s/>R$ 1,275,432.48 </text:p>
          </table:table-cell>
          <table:table-cell table:style-name="ce20" office:value-type="float" office:value="436390" calcext:value-type="float">
            <text:p><text:s/>R$ 436,390.00 </text:p>
          </table:table-cell>
          <table:table-cell table:style-name="ce26" table:formula="of:=1-[.K2]/[.J2]" office:value-type="percentage" office:value="0.657849390819967" calcext:value-type="percentage">
            <text:p>65.78%</text:p>
          </table:table-cell>
          <table:table-cell table:number-columns-repeated="1635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ELEVADORES ATLAS SCHINDLER SEM CASA DE MÁQUINAS - 8 PARADAS - PERCURSO DE 29,40M - CAPAC. 8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603.93" calcext:value-type="float">
            <text:p><text:s/>R$ 603.93 </text:p>
          </table:table-cell>
          <table:table-cell table:style-name="ce20" table:formula="of:=[.D3]*[.E3]" office:value-type="float" office:value="1207.86" calcext:value-type="float">
            <text:p><text:s/>R$ 1,207.8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ELEVADORES THYSSENKRUPP COM CASA DE MÁQUINAS - 7 PARADAS - PERCURSO DE 21,60M - CAPAC. 8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603.93" calcext:value-type="float">
            <text:p><text:s/>R$ 603.93 </text:p>
          </table:table-cell>
          <table:table-cell table:style-name="ce20" table:formula="of:=[.D4]*[.E4]" office:value-type="float" office:value="1207.86" calcext:value-type="float">
            <text:p><text:s/>R$ 1,207.8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ELEVADOR THYSSENKRUPP SEM CASA DE MÁQUINAS - 2 PARADAS - PERCURSO DE 4,00M - CAPAC. 9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5]*[.E5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ELEVADORES CORTEX - COM CASA DE MÁQUINAS - 6 PARADAS - PERCURSO DE 16,67M - CAPAC. 8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594.78" calcext:value-type="float">
            <text:p><text:s/>R$ 594.78 </text:p>
          </table:table-cell>
          <table:table-cell table:style-name="ce20" table:formula="of:=[.D6]*[.E6]" office:value-type="float" office:value="1189.56" calcext:value-type="float">
            <text:p><text:s/>R$ 1,189.5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ELEVADOR BASS TIPO PANORÂMICO SEM CASA DE MÁQUINAS - 5 PARADAS - CAPAC. 8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7]*[.E7]" office:value-type="float" office:value="603.92" calcext:value-type="float">
            <text:p><text:s/>R$ 603.92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ELEVADORES ATLAS SCHINDLER - SEM CASA DE MÁQUINAS - 5 PARADAS- CAPAC. 10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594.78" calcext:value-type="float">
            <text:p><text:s/>R$ 594.78 </text:p>
          </table:table-cell>
          <table:table-cell table:style-name="ce20" table:formula="of:=[.D8]*[.E8]" office:value-type="float" office:value="1189.56" calcext:value-type="float">
            <text:p><text:s/>R$ 1,189.5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PLATAFORMA ELEVATÓRIA COM ELEVAÇÃO 1,70M ALTURA - CAPACIDADE DE 250 KG, COM ENTRADA E SAÍDA OPOSTA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4.71" calcext:value-type="float">
            <text:p><text:s/>R$ 304.71 </text:p>
          </table:table-cell>
          <table:table-cell table:style-name="ce20" table:formula="of:=[.D9]*[.E9]" office:value-type="float" office:value="304.71" calcext:value-type="float">
            <text:p><text:s/>R$ 304.71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ELEVADOR EQUIBRASIL - COM CASA DE MÁQUINAS - 8 PARADAS - PERCURSO DE 26,90M - CAPAC. 16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10]*[.E10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ELEVADOR EQUIBRASIL - COM CASA DE MÁQUINAS - 8 PARADAS - PERCURSO DE 26,90M - CAPAC. 20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18.43" calcext:value-type="float">
            <text:p><text:s/>R$ 318.43 </text:p>
          </table:table-cell>
          <table:table-cell table:style-name="ce20" table:formula="of:=[.D11]*[.E11]" office:value-type="float" office:value="318.43" calcext:value-type="float">
            <text:p><text:s/>R$ 318.43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ELEVADOR ATLAS SCHINDLER - SEM CASA DE MÁQUINAS - 5 PARADAS - PERCURSO DE 12,60M - CAPAC. 8 PASSAGEIROS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12]*[.E12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LATAFORMA MOTORIZADA VIMEC V65 PARA ESCADA EM CURVA, PERCURSO PARA ATÉ 11M - CAPACIDADE DE CARGA 330KG</text:p>
          </table:table-cell>
          <table:table-cell table:style-name="ce4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13]*[.E13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PLATAFORMA ELEVATÓRIA CABINADA - PERCURSO DE 3,77M - CAPACIDADE DE 250 KG, COM ACESSO APENAS UM LADO – THYSSENKRUPP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14]*[.E14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ELEVADOR MONTANA COM CASA DE MÁQUINAS - 3 PARADAS - CAPACIDADE DE 2000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18.43" calcext:value-type="float">
            <text:p><text:s/>R$ 318.43 </text:p>
          </table:table-cell>
          <table:table-cell table:style-name="ce20" table:formula="of:=[.D15]*[.E15]" office:value-type="float" office:value="318.43" calcext:value-type="float">
            <text:p><text:s/>R$ 318.43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ELEVADOR OTIS COM CASA DE MÁQUINAS - 4 PARADAS - CAPACIDADE DE 63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16]*[.E16]" office:value-type="float" office:value="603.92" calcext:value-type="float">
            <text:p><text:s/>R$ 603.92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ELEVADOR EQUIBRASIL - SEM CASA DE MÁQUINAS - 5 PARADAS - PERCURSO DE 16,80M - CAPAC. 9 PASSAGEIROS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594.78" calcext:value-type="float">
            <text:p><text:s/>R$ 594.78 </text:p>
          </table:table-cell>
          <table:table-cell table:style-name="ce20" table:formula="of:=[.D17]*[.E17]" office:value-type="float" office:value="1189.56" calcext:value-type="float">
            <text:p><text:s/>R$ 1,189.5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ELEVADOR EQUIBRASIL - SEM CASA DE MÁQUINAS - 8 PARADAS - PERCURSO DE 29,40M - CAPAC. 9 PASSAGEIROS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594.78" calcext:value-type="float">
            <text:p><text:s/>R$ 594.78 </text:p>
          </table:table-cell>
          <table:table-cell table:style-name="ce20" table:formula="of:=[.D18]*[.E18]" office:value-type="float" office:value="1189.56" calcext:value-type="float">
            <text:p><text:s/>R$ 1,189.5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9" office:value-type="string" calcext:value-type="string">
            <text:p>ELEVADOR EQUIBRASIL - COM CASA DE MÁQUINAS - 8 PARADAS - PERCURSO DE 16,80M - CAPAC. 8 PASSAGEIROS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19]*[.E19]" office:value-type="float" office:value="603.92" calcext:value-type="float">
            <text:p><text:s/>R$ 603.92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ELEVADOR EQUIBRASIL - COM CASA DE MÁQUINAS - 8 PARADAS - PERCURSO DE 26,90M - CAPAC. 20 PASSAGEIROS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20]*[.E20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9" office:value-type="string" calcext:value-type="string">
            <text:p>ELEVADOR OTIS COM CASA DE MÁQUINAS - 5 PARADAS - CAPACIDADE 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418.31" calcext:value-type="float">
            <text:p><text:s/>R$ 1,418.31 </text:p>
          </table:table-cell>
          <table:table-cell table:style-name="ce20" table:formula="of:=[.D21]*[.E21]" office:value-type="float" office:value="2836.62" calcext:value-type="float">
            <text:p><text:s/>R$ 2,836.62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ELEVADOR KONE COM CASA DE MÁQUINAS - 4 PARADAS - CAPACIDADE DE 45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006.55" calcext:value-type="float">
            <text:p><text:s/>R$ 1,006.55 </text:p>
          </table:table-cell>
          <table:table-cell table:style-name="ce20" table:formula="of:=[.D22]*[.E22]" office:value-type="float" office:value="1006.55" calcext:value-type="float">
            <text:p><text:s/>R$ 1,006.55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ELEVADOR THYSSENKRUPP COM CASA DE MÁQUINAS - 5 PARADAS - - CAPACIDADE 600 KG -BLOCO DE LIG H-I DO CCS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23]*[.E23]" office:value-type="float" office:value="603.92" calcext:value-type="float">
            <text:p><text:s/>R$ 603.92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ELEVADOR SCHINDLER SEM CASA DE MÁQUINAS - 5 PARADAS - CAPACIDADE 675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594.78" calcext:value-type="float">
            <text:p><text:s/>R$ 594.78 </text:p>
          </table:table-cell>
          <table:table-cell table:style-name="ce20" table:formula="of:=[.D24]*[.E24]" office:value-type="float" office:value="1189.56" calcext:value-type="float">
            <text:p><text:s/>R$ 1,189.5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ELEVADOR THYSSENKRUPP COM CASA DE MÁQUINAS - 6 PARADAS - - CAPACIDADE 60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25]*[.E25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ELEVADOR THYSSENKRUPP COM CASA DE MÁQUINAS - 13 PARADAS - CAPACIDADE 75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594.78" calcext:value-type="float">
            <text:p><text:s/>R$ 594.78 </text:p>
          </table:table-cell>
          <table:table-cell table:style-name="ce20" table:formula="of:=[.D26]*[.E26]" office:value-type="float" office:value="1189.56" calcext:value-type="float">
            <text:p><text:s/>R$ 1,189.5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ELEVADOR SCHINDLER SEM CASA DE MÁQUINAS - 6 PARADAS - CAPACIDADE 675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27]*[.E27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ELEVADOR SCHINDLER SEM CASA DE MÁQUINAS - 7 PARADAS - CAPACIDADE 675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28]*[.E28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ELEVADOR JOSS COM CASA DE MÁQUINAS - 4 PARADAS - CAPACIDA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29]*[.E29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ELEVADOR SCHINDLER SEM CASA DE MÁQUINAS - 4 PARADAS - CAPACIDADE 60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0]*[.E30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ELEVADOR CASTELO COM CASA DE MÁQUINAS - 6 PARADAS - CAPACIDA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1]*[.E31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9" office:value-type="string" calcext:value-type="string">
            <text:p>ELEVADOR MONTANA COM CASA DE MÁQUINAS - 5 PARADAS - CAPACIDA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2]*[.E32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9" office:value-type="string" calcext:value-type="string">
            <text:p>ELEVADOR SCHINDLER COM CASA DE MÁQUINAS - 4 PARADAS - CAPACIDADE 60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823.54" calcext:value-type="float">
            <text:p><text:s/>R$ 823.54 </text:p>
          </table:table-cell>
          <table:table-cell table:style-name="ce20" table:formula="of:=[.D33]*[.E33]" office:value-type="float" office:value="2470.62" calcext:value-type="float">
            <text:p><text:s/>R$ 2,470.62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9" office:value-type="string" calcext:value-type="string">
            <text:p>ELEVADOR CASTELO COM CASA DE MÁQUINAS - 5 PARADAS - CAPACIDA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4]*[.E34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PLATAFORMA ELEVATÓRIA DAIKEN SEM CASA DE MÁQUINAS - 2 PARADAS - CAPACIDADE 25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5]*[.E35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ELEVADOR OTIS COM CASA DE MÁQUINAS - 6 PARADAS - CAPACIDA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869.29" calcext:value-type="float">
            <text:p><text:s/>R$ 869.29 </text:p>
          </table:table-cell>
          <table:table-cell table:style-name="ce20" table:formula="of:=[.D36]*[.E36]" office:value-type="float" office:value="1738.58" calcext:value-type="float">
            <text:p><text:s/>R$ 1,738.58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ELEVADOR SCHINDLER COM CASA DE MÁQUINAS - 5 PARADAS - CAPACIDA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7]*[.E37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9" office:value-type="string" calcext:value-type="string">
            <text:p>ELEVADOR JOSS COM CASA DE MÁQUINAS - 5 PARADAS - CAPACIDADE 56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8]*[.E38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ELEVADOR JOSS COM CASA DE MÁQUINAS - 3 PARADAS - CAPACIDADE 60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39]*[.E39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9" office:value-type="string" calcext:value-type="string">
            <text:p>ELEVADOR OTIS COM CASA DE MÁQUINAS - 3 PARADAS - CAPACIDADE 63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01.96" calcext:value-type="float">
            <text:p><text:s/>R$ 301.96 </text:p>
          </table:table-cell>
          <table:table-cell table:style-name="ce20" table:formula="of:=[.D40]*[.E40]" office:value-type="float" office:value="301.96" calcext:value-type="float">
            <text:p><text:s/>R$ 301.96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9" office:value-type="string" calcext:value-type="string">
            <text:p>ELEVADOR RAYS COM CASA DE MÁQUINAS - 4 PARADAS - - CAPACIDADE 825 KG - BLOCO DE ARQUITETURA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189.55" calcext:value-type="float">
            <text:p><text:s/>R$ 1,189.55 </text:p>
          </table:table-cell>
          <table:table-cell table:style-name="ce20" table:formula="of:=[.D41]*[.E41]" office:value-type="float" office:value="1189.55" calcext:value-type="float">
            <text:p><text:s/>R$ 1,189.55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9" office:value-type="string" calcext:value-type="string">
            <text:p>ELEVADOR THYSSENKRUPP COM CASA DE MÁQUINAS - 7 PARADAS - CAPACIDADE 450 KG</text:p>
          </table:table-cell>
          <table:table-cell table:style-name="ce2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830.09" calcext:value-type="float">
            <text:p><text:s/>R$ 1,830.09 </text:p>
          </table:table-cell>
          <table:table-cell table:style-name="ce20" table:formula="of:=[.D42]*[.E42]" office:value-type="float" office:value="1830.09" calcext:value-type="float">
            <text:p><text:s/>R$ 1,830.09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9" office:value-type="string" calcext:value-type="string">
            <text:p>ELEVADOR OTIS COM CASA DE MÁQUINAS - 4 PARADAS - CAPACIDADE 560 KG</text:p>
          </table:table-cell>
          <table:table-cell table:style-name="ce3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116.35" calcext:value-type="float">
            <text:p><text:s/>R$ 1,116.35 </text:p>
          </table:table-cell>
          <table:table-cell table:style-name="ce20" table:formula="of:=[.D43]*[.E43]" office:value-type="float" office:value="1116.35" calcext:value-type="float">
            <text:p><text:s/>R$ 1,116.35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9" office:value-type="string" calcext:value-type="string">
            <text:p>ELEVADOR SCHINDLER SEM CASA DE MÁQUINAS - 5 PARADAS - CAPACIDADE 630 KG</text:p>
          </table:table-cell>
          <table:table-cell table:style-name="ce3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116.35" calcext:value-type="float">
            <text:p><text:s/>R$ 1,116.35 </text:p>
          </table:table-cell>
          <table:table-cell table:style-name="ce20" table:formula="of:=[.D44]*[.E44]" office:value-type="float" office:value="1116.35" calcext:value-type="float">
            <text:p><text:s/>R$ 1,116.35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ELEVADOR OTIS SEM CASA DE MÁQUINAS - 4 PARADAS - CAPACIDADE 630 KG</text:p>
          </table:table-cell>
          <table:table-cell table:style-name="ce3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207.85" calcext:value-type="float">
            <text:p><text:s/>R$ 1,207.85 </text:p>
          </table:table-cell>
          <table:table-cell table:style-name="ce20" table:formula="of:=[.D45]*[.E45]" office:value-type="float" office:value="1207.85" calcext:value-type="float">
            <text:p><text:s/>R$ 1,207.85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9" office:value-type="string" calcext:value-type="string">
            <text:p>PLATAFORMA ELEVATÓRIA BLOTEK MODELO PLT300 SEM CASA DE MÁQUINAS - 2 PARADAS - CAPACIDADE 300 KG</text:p>
          </table:table-cell>
          <table:table-cell table:style-name="ce3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622.23" calcext:value-type="float">
            <text:p><text:s/>R$ 622.23 </text:p>
          </table:table-cell>
          <table:table-cell table:style-name="ce20" table:formula="of:=[.D46]*[.E46]" office:value-type="float" office:value="622.23" calcext:value-type="float">
            <text:p><text:s/>R$ 622.23 </text:p>
          </table:table-cell>
          <table:table-cell table:style-name="ce24"/>
          <table:table-cell table:number-columns-repeated="16363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9" office:value-type="string" calcext:value-type="string">
            <text:p>ELEVADOR CORTEX COM CASA DE MÁQUINAS - 2 PARADAS - CAPACIDADE 600 KG</text:p>
          </table:table-cell>
          <table:table-cell table:style-name="ce3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024.85" calcext:value-type="float">
            <text:p><text:s/>R$ 1,024.85 </text:p>
          </table:table-cell>
          <table:table-cell table:style-name="ce20" table:formula="of:=[.D47]*[.E47]" office:value-type="float" office:value="1024.85" calcext:value-type="float">
            <text:p><text:s/>R$ 1,024.85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1" office:value-type="string" calcext:value-type="string">
            <text:p>ELEVADOR THYSSENKRUPP SEM CASA DE MÁQUINAS - 5 PARADAS - CAPACIDADE 10 PESSOAS</text:p>
          </table:table-cell>
          <table:table-cell table:style-name="ce3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445.77" calcext:value-type="float">
            <text:p><text:s/>R$ 1,445.77 </text:p>
          </table:table-cell>
          <table:table-cell table:style-name="ce20" table:formula="of:=[.D48]*[.E48]" office:value-type="float" office:value="1445.77" calcext:value-type="float">
            <text:p><text:s/>R$ 1,445.77 </text:p>
          </table:table-cell>
          <table:table-cell table:style-name="ce24"/>
          <table:table-cell table:number-columns-repeated="16363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12" office:value-type="string" calcext:value-type="string">
            <text:p>ELEVADOR ADVENTUS COM CASA DE MÁQUINAS - COMANDO SCANCHIP - <text:s/>4 PARADAS - <text:s/>CAPACIDADE 600 KG</text:p>
          </table:table-cell>
          <table:table-cell table:style-name="ce3" office:value-type="string" calcext:value-type="string">
            <text:p>Mê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207.85" calcext:value-type="float">
            <text:p><text:s/>R$ 1,207.85 </text:p>
          </table:table-cell>
          <table:table-cell table:style-name="ce20" table:formula="of:=[.D49]*[.E49]" office:value-type="float" office:value="1207.85" calcext:value-type="float">
            <text:p><text:s/>R$ 1,207.85 </text:p>
          </table:table-cell>
          <table:table-cell table:style-name="ce24"/>
          <table:table-cell table:number-columns-repeated="16363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13" office:value-type="string" calcext:value-type="string">
            <text:p>Manutenção preventiva e corretiva de Elevador TKE - COM CASA DE MÁQUINAS - 6 PARADAS - CAPAC. 8 PASSAGEIROS, com fornecimento de peças.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1500*[.L2]" office:value-type="float" office:value="986.774086229951" calcext:value-type="float">
            <text:p><text:s/>R$ 986.77 </text:p>
          </table:table-cell>
          <table:table-cell table:style-name="ce20" table:formula="of:=[.D50]*[.E50]" office:value-type="float" office:value="986.774086229951" calcext:value-type="float">
            <text:p><text:s/>R$ 986.77 </text:p>
          </table:table-cell>
          <table:table-cell table:style-name="ce24"/>
          <table:table-cell table:number-columns-repeated="1636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3" office:value-type="string" calcext:value-type="string">
            <text:p>Manutenção preventiva e corretiva de 2. ELEVADOR BOXTOP – SEM CASA DE MÁQUINAS - 7 PARADAS – CAPAC. 750kg, com fornecimento de peças.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2760*[.L2]" office:value-type="float" office:value="1815.66431866311" calcext:value-type="float">
            <text:p><text:s/>R$ 1,815.66 </text:p>
          </table:table-cell>
          <table:table-cell table:style-name="ce20" table:formula="of:=[.D51]*[.E51]" office:value-type="float" office:value="1815.66431866311" calcext:value-type="float">
            <text:p><text:s/>R$ 1,815.66 </text:p>
          </table:table-cell>
          <table:table-cell table:style-name="ce24"/>
          <table:table-cell table:number-columns-repeated="16363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13" office:value-type="string" calcext:value-type="string">
            <text:p>Manutenção preventiva e corretiva de ELEVADOR ATLÂNTICO - SEM CASA DE MÁQUINAS - 3 PARADAS - CAPAC. 10 PASSAGEIROS, com fornecimento de peças.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882*[.L2]" office:value-type="float" office:value="580.223162703211" calcext:value-type="float">
            <text:p><text:s/>R$ 580.22 </text:p>
          </table:table-cell>
          <table:table-cell table:style-name="ce20" table:formula="of:=[.D52]*[.E52]" office:value-type="float" office:value="580.223162703211" calcext:value-type="float">
            <text:p><text:s/>R$ 580.22 </text:p>
          </table:table-cell>
          <table:table-cell table:style-name="ce24"/>
          <table:table-cell table:number-columns-repeated="16363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3" office:value-type="string" calcext:value-type="string">
            <text:p>Manutenção preventiva e corretiva de PLATAFORMA ELEVATÓRIA DAIKEN AC02 - CAPAC. 2 PASSAGEIROS, com fornecimento de peças.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640*[.L2]" office:value-type="float" office:value="421.023610124779" calcext:value-type="float">
            <text:p><text:s/>R$ 421.02 </text:p>
          </table:table-cell>
          <table:table-cell table:style-name="ce20" table:formula="of:=[.D53]*[.E53]" office:value-type="float" office:value="421.023610124779" calcext:value-type="float">
            <text:p><text:s/>R$ 421.02 </text:p>
          </table:table-cell>
          <table:table-cell table:style-name="ce24"/>
          <table:table-cell table:number-columns-repeated="3"/>
          <table:table-cell table:style-name="ce25" office:value-type="string" calcext:value-type="string">
            <text:p>2760</text:p>
          </table:table-cell>
          <table:table-cell table:number-columns-repeated="16359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3" office:value-type="string" calcext:value-type="string">
            <text:p>Manutenção preventiva e corretiva de PLATAFORMA ELEVATÓRIA DAIKEN HIDRÁULICA AC11 - CAPAC. 250kg – com fornecimento de peças. <text:s/>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640*[.L2]" office:value-type="float" office:value="421.023610124779" calcext:value-type="float">
            <text:p><text:s/>R$ 421.02 </text:p>
          </table:table-cell>
          <table:table-cell table:style-name="ce20" table:formula="of:=[.D54]*[.E54]" office:value-type="float" office:value="421.023610124779" calcext:value-type="float">
            <text:p><text:s/>R$ 421.02 </text:p>
          </table:table-cell>
          <table:table-cell table:style-name="ce24"/>
          <table:table-cell table:number-columns-repeated="1636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13" office:value-type="string" calcext:value-type="string">
            <text:p>Manutenção preventiva e corretiva de Plataforma Elevatória Cabinada CDS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882*[.L2]" office:value-type="float" office:value="580.223162703211" calcext:value-type="float">
            <text:p><text:s/>R$ 580.22 </text:p>
          </table:table-cell>
          <table:table-cell table:style-name="ce20" table:formula="of:=[.D55]*[.E55]" office:value-type="float" office:value="580.223162703211" calcext:value-type="float">
            <text:p><text:s/>R$ 580.22 </text:p>
          </table:table-cell>
          <table:table-cell table:style-name="ce24"/>
          <table:table-cell table:number-columns-repeated="16363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3" office:value-type="string" calcext:value-type="string">
            <text:p>Manutenção preventiva e corretiva de ELEVADOR SCHINDLER - COM CASA DE MÁQUINAS - 4 PARADAS - CAPAC. 20 PASSAGEIROS, com fornecimento de peças.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920*[.L2]" office:value-type="float" office:value="605.22143955437" calcext:value-type="float">
            <text:p><text:s/>R$ 605.22 </text:p>
          </table:table-cell>
          <table:table-cell table:style-name="ce20" table:formula="of:=[.D56]*[.E56]" office:value-type="float" office:value="605.22143955437" calcext:value-type="float">
            <text:p><text:s/>R$ 605.22 </text:p>
          </table:table-cell>
          <table:table-cell table:style-name="ce24"/>
          <table:table-cell table:number-columns-repeated="16363"/>
        </table:table-row>
        <table:table-row table:style-name="ro5">
          <table:table-cell table:style-name="ce5" office:value-type="float" office:value="56" calcext:value-type="float">
            <text:p>56</text:p>
          </table:table-cell>
          <table:table-cell table:style-name="ce13" office:value-type="string" calcext:value-type="string">
            <text:p>Manutenção preventiva e corretiva de Elevador Daiken HL02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640*[.L2]" office:value-type="float" office:value="421.023610124779" calcext:value-type="float">
            <text:p><text:s/>R$ 421.02 </text:p>
          </table:table-cell>
          <table:table-cell table:style-name="ce20" table:formula="of:=[.D57]*[.E57]" office:value-type="float" office:value="421.023610124779" calcext:value-type="float">
            <text:p><text:s/>R$ 421.02 </text:p>
          </table:table-cell>
          <table:table-cell table:style-name="ce24"/>
          <table:table-cell table:number-columns-repeated="16363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3" office:value-type="string" calcext:value-type="string">
            <text:p>Manutenção preventiva e corretiva de PLATAFORMA ELEVATÓRIA DAIKEN HIDRÁULICA AC11 - CAPAC. 325 kg – com fornecimento de peças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575*[.L2]" office:value-type="float" office:value="378.263399721481" calcext:value-type="float">
            <text:p><text:s/>R$ 378.26 </text:p>
          </table:table-cell>
          <table:table-cell table:style-name="ce20" table:formula="of:=[.D58]*[.E58]" office:value-type="float" office:value="378.263399721481" calcext:value-type="float">
            <text:p><text:s/>R$ 378.26 </text:p>
          </table:table-cell>
          <table:table-cell table:style-name="ce24"/>
          <table:table-cell table:number-columns-repeated="16363"/>
        </table:table-row>
        <table:table-row table:style-name="ro5">
          <table:table-cell table:style-name="ce5" office:value-type="float" office:value="58" calcext:value-type="float">
            <text:p>58</text:p>
          </table:table-cell>
          <table:table-cell table:style-name="ce13" office:value-type="string" calcext:value-type="string">
            <text:p>Manutenção preventiva e corretiva de Funicular – PH05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920*[.L2]" office:value-type="float" office:value="605.22143955437" calcext:value-type="float">
            <text:p><text:s/>R$ 605.22 </text:p>
          </table:table-cell>
          <table:table-cell table:style-name="ce20" table:formula="of:=[.D59]*[.E59]" office:value-type="float" office:value="605.22143955437" calcext:value-type="float">
            <text:p><text:s/>R$ 605.22 </text:p>
          </table:table-cell>
          <table:table-cell table:style-name="ce24"/>
          <table:table-cell table:number-columns-repeated="16363"/>
        </table:table-row>
        <table:table-row table:style-name="ro6">
          <table:table-cell table:style-name="ce5" office:value-type="float" office:value="59" calcext:value-type="float">
            <text:p>59</text:p>
          </table:table-cell>
          <table:table-cell table:style-name="ce14" office:value-type="string" calcext:value-type="string">
            <text:p>Manutenção preventiva e corretiva de ELEVADOR Elesul comando Scanchip - COM CASA DE MÁQUINAS - 4 PARADAS - CAPAC. 10 PASSAGEIROS, com fornecimento de peças. </text:p>
          </table:table-cell>
          <table:table-cell table:style-name="ce16" office:value-type="string" calcext:value-type="string">
            <text:p>Mê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640*[.L2]" office:value-type="float" office:value="421.023610124779" calcext:value-type="float">
            <text:p><text:s/>R$ 421.02 </text:p>
          </table:table-cell>
          <table:table-cell table:style-name="ce20" table:formula="of:=[.D60]*[.E60]" office:value-type="float" office:value="421.023610124779" calcext:value-type="float">
            <text:p><text:s/>R$ 421.02 </text:p>
          </table:table-cell>
          <table:table-cell table:style-name="ce24"/>
          <table:table-cell table:number-columns-repeated="16363"/>
        </table:table-row>
        <table:table-row table:style-name="ro7">
          <table:table-cell table:style-name="ce6" office:value-type="string" calcext:value-type="string" table:number-columns-spanned="5" table:number-rows-spanned="1">
            <text:p>TOTAL</text:p>
          </table:table-cell>
          <table:covered-table-cell table:number-columns-repeated="4" table:style-name="ce6"/>
          <table:table-cell table:style-name="ce22" table:formula="of:=SUM([.F2:.F60])*12" office:value-type="float" office:value="566005.625395546" calcext:value-type="float">
            <text:p><text:s/>R$ 566,005.63 </text:p>
          </table:table-cell>
          <table:table-cell table:style-name="ce24"/>
          <table:table-cell table:number-columns-repeated="16363"/>
        </table:table-row>
        <table:table-row table:style-name="ro8" table:number-rows-repeated="3">
          <table:table-cell table:number-columns-repeated="16370"/>
        </table:table-row>
        <table:table-row table:style-name="ro8">
          <table:table-cell table:number-columns-repeated="5"/>
          <table:table-cell table:style-name="ce23"/>
          <table:table-cell table:number-columns-repeated="16364"/>
        </table:table-row>
        <table:table-row table:style-name="ro8" table:number-rows-repeated="1048510">
          <table:table-cell table:number-columns-repeated="16370"/>
        </table:table-row>
        <table:table-row table:style-name="ro9"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1" svg:font-family="Calibri" style:font-family-generic="roman"/>
    <style:font-face style:name="Liberation Sans" svg:font-family="'Liberation Sans'" style:font-family-generic="swiss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5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0T08:57:03.807062269</meta:creation-date>
    <dc:date>2026-06-10T08:57:28.062202629</dc:date>
    <meta:editing-duration>PT24S</meta:editing-duration>
    <meta:editing-cycles>1</meta:editing-cycles>
    <meta:document-statistic meta:table-count="1" meta:cell-count="369" meta:object-count="0"/>
    <meta:generator>LibreOffice/25.8.7.3$Linux_X86_64 LibreOffice_project/580$Build-3</meta:generator>
  </office:meta>
</office:document-meta>
</file>